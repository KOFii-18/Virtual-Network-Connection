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able_20_Heading">
      <style:paragraph-properties fo:text-align="left" style:justify-single-word="false"/>
    </style:style>
    <style:style style:name="P10" style:family="paragraph" style:parent-style-name="Table_20_Contents">
      <style:paragraph-properties fo:text-align="left" style:justify-single-word="false"/>
    </style:style>
    <style:style style:name="P11" style:family="paragraph" style:parent-style-name="Text_20_body" style:list-style-name="L8"/>
    <style:style style:name="P12" style:family="paragraph" style:parent-style-name="Text_20_body" style:list-style-name="L9"/>
    <style:style style:name="T1" style:family="text">
      <style:text-properties fo:font-weight="bold"/>
    </style:style>
    <style:style style:name="T2" style:family="text">
      <style:text-properties style:font-name="Liberation Mono"/>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Virtual Machine Setup and Remote Connection</text:h>
      <text:h text:style-name="Heading_20_2" text:outline-level="2">Overview</text:h>
      <text:p text:style-name="Text_20_body">This project demonstrates the process of configuring networking and security for Azure Virtual Machines (VMs), establishing secure remote connections (RDP for Windows, SSH for Linux), and applying best practices for session management. Due to subscription expiration, live connections could not be completed, but the documented steps reflect the correct procedure.</text:p>
      <text:p text:style-name="Horizontal_20_Line"/>
      <text:h text:style-name="Heading_20_2" text:outline-level="2">Steps Documented</text:h>
      <text:h text:style-name="Heading_20_3" text:outline-level="3">1. Configure Networking and Security</text:h>
      <text:list text:style-name="L1">
        <text:list-item>
          <text:p text:style-name="P1">Created a Network Security Group (NSG).</text:p>
        </text:list-item>
        <text:list-item>
          <text:p text:style-name="P2">Allowed inbound traffic:</text:p>
          <text:list>
            <text:list-item>
              <text:p text:style-name="P1">Port 3389 (Windows RDP)</text:p>
            </text:list-item>
            <text:list-item>
              <text:p text:style-name="P1">Port 22 (Linux SSH)</text:p>
            </text:list-item>
          </text:list>
        </text:list-item>
        <text:list-item>
          <text:p text:style-name="P1">Restricted rules to <text:span text:style-name="T1">my IP address only</text:span> for security.</text:p>
        </text:list-item>
      </text:list>
      <text:p text:style-name="Text_20_body"><text:span text:style-name="T1">Screenshot:</text:span> NSG inbound rules showing allowed ports.</text:p>
      <text:p text:style-name="Horizontal_20_Line"/>
      <text:h text:style-name="Heading_20_3" text:outline-level="3">2. Identify Connection Endpoints</text:h>
      <text:list text:style-name="L2">
        <text:list-item>
          <text:p text:style-name="P3">Normally, the VM overview blade displays the <text:span text:style-name="T1">Public IP address</text:span> and DNS name.</text:p>
        </text:list-item>
        <text:list-item>
          <text:p text:style-name="P3">With an active subscription, this IP is used for RDP/SSH connections.</text:p>
        </text:list-item>
        <text:list-item>
          <text:p text:style-name="P3">Placeholder IP used for documentation: <text:span text:style-name="T2">52.167.43.210</text:span>.</text:p>
        </text:list-item>
      </text:list>
      <text:p text:style-name="Horizontal_20_Line"/>
      <text:h text:style-name="Heading_20_3" text:outline-level="3">3. Establish Windows Connection (RDP)</text:h>
      <text:list text:style-name="L3">
        <text:list-item>
          <text:p text:style-name="P4">Use Remote Desktop Connection client.</text:p>
        </text:list-item>
        <text:list-item>
          <text:p text:style-name="P4">Enter the VM’s Public IP.</text:p>
        </text:list-item>
        <text:list-item>
          <text:p text:style-name="P4">Authenticate with admin credentials.</text:p>
        </text:list-item>
        <text:list-item>
          <text:p text:style-name="P4">Navigate the desktop to verify access.</text:p>
        </text:list-item>
      </text:list>
      <text:p text:style-name="Horizontal_20_Line"/>
      <text:h text:style-name="Heading_20_3" text:outline-level="3">4. Establish Linux Connection (SSH)</text:h>
      <text:list text:style-name="L4">
        <text:list-item>
          <text:p text:style-name="P5">Use SSH client (Terminal/PowerShell/PuTTY).</text:p>
        </text:list-item>
        <text:list-item>
          <text:p text:style-name="P5">Command: <text:span text:style-name="T2">ssh azureuser@&lt;PublicIP&gt;</text:span></text:p>
        </text:list-item>
        <text:list-item>
          <text:p text:style-name="P5"><text:soft-page-break/>Authenticate with password or SSH key.</text:p>
        </text:list-item>
        <text:list-item>
          <text:p text:style-name="P5">Verify access with commands like <text:span text:style-name="T2">ls</text:span>, <text:span text:style-name="T2">pwd</text:span>, <text:span text:style-name="T2">uname -a</text:span>.</text:p>
        </text:list-item>
      </text:list>
      <text:p text:style-name="Horizontal_20_Line"/>
      <text:h text:style-name="Heading_20_3" text:outline-level="3">5. Verify System Access</text:h>
      <text:list text:style-name="L5">
        <text:list-item>
          <text:p text:style-name="P6">Windows: open File Explorer or Settings.</text:p>
        </text:list-item>
        <text:list-item>
          <text:p text:style-name="P6">Linux: list files, check installed packages.</text:p>
        </text:list-item>
      </text:list>
      <text:p text:style-name="Horizontal_20_Line"/>
      <text:h text:style-name="Heading_20_3" text:outline-level="3">6. Secure the Environment</text:h>
      <text:list text:style-name="L6">
        <text:list-item>
          <text:p text:style-name="P7">Restricted NSG inbound rules to <text:span text:style-name="T1">my IP only</text:span>.</text:p>
        </text:list-item>
        <text:list-item>
          <text:p text:style-name="P7">Disabled unused ports.</text:p>
        </text:list-item>
        <text:list-item>
          <text:p text:style-name="P7">Documented SSH key‑based authentication for Linux VM.</text:p>
        </text:list-item>
      </text:list>
      <text:p text:style-name="Horizontal_20_Line"/>
      <text:h text:style-name="Heading_20_3" text:outline-level="3">7. Manage Remote Sessions</text:h>
      <text:list text:style-name="L7">
        <text:list-item>
          <text:p text:style-name="P8">Properly terminate RDP and SSH sessions.</text:p>
        </text:list-item>
        <text:list-item>
          <text:p text:style-name="P8">Ensure VM remains secure and responsive.</text:p>
        </text:list-item>
      </text:list>
      <text:p text:style-name="Horizontal_20_Line"/>
      <text:h text:style-name="Heading_20_2" text:outline-level="2">Configuration Details</text:h>
      <table:table table:name="Table1" table:style-name="Table1">
        <table:table-column table:style-name="Table1.A" table:number-columns-repeated="4"/>
        <table:table-header-rows>
          <table:table-row>
            <table:table-cell table:style-name="Table1.A1" office:value-type="string">
              <text:p text:style-name="P9">Rule</text:p>
            </table:table-cell>
            <table:table-cell table:style-name="Table1.A1" office:value-type="string">
              <text:p text:style-name="P9">Port</text:p>
            </table:table-cell>
            <table:table-cell table:style-name="Table1.A1" office:value-type="string">
              <text:p text:style-name="P9">Protocol</text:p>
            </table:table-cell>
            <table:table-cell table:style-name="Table1.D1" office:value-type="string">
              <text:p text:style-name="P9">Source</text:p>
            </table:table-cell>
          </table:table-row>
        </table:table-header-rows>
        <table:table-row>
          <table:table-cell table:style-name="Table1.A2" office:value-type="string">
            <text:p text:style-name="P10">Windows RDP</text:p>
          </table:table-cell>
          <table:table-cell table:style-name="Table1.A2" office:value-type="string">
            <text:p text:style-name="P10">3389</text:p>
          </table:table-cell>
          <table:table-cell table:style-name="Table1.A2" office:value-type="string">
            <text:p text:style-name="P10">TCP</text:p>
          </table:table-cell>
          <table:table-cell table:style-name="Table1.D2" office:value-type="string">
            <text:p text:style-name="P10">My IP only</text:p>
          </table:table-cell>
        </table:table-row>
        <table:table-row>
          <table:table-cell table:style-name="Table1.A2" office:value-type="string">
            <text:p text:style-name="P10">Linux SSH</text:p>
          </table:table-cell>
          <table:table-cell table:style-name="Table1.A2" office:value-type="string">
            <text:p text:style-name="P10">22</text:p>
          </table:table-cell>
          <table:table-cell table:style-name="Table1.A2" office:value-type="string">
            <text:p text:style-name="P10">TCP</text:p>
          </table:table-cell>
          <table:table-cell table:style-name="Table1.D2" office:value-type="string">
            <text:p text:style-name="P10">My IP only</text:p>
          </table:table-cell>
        </table:table-row>
      </table:table>
      <text:p text:style-name="Text_20_body"/>
      <text:p text:style-name="Horizontal_20_Line"/>
      <text:h text:style-name="Heading_20_2" text:outline-level="2">Limitations Due to Subscription Expiration</text:h>
      <text:p text:style-name="Text_20_body">At the time of submission, my Azure subscription had expired.<text:line-break/>This prevented me from assigning a Public IP address and connecting to the VM via RDP or SSH.</text:p>
      <text:p text:style-name="Text_20_body">To demonstrate understanding, I documented:</text:p>
      <text:list text:style-name="L8">
        <text:list-item>
          <text:p text:style-name="P11">How to configure NSG rules for secure access.</text:p>
        </text:list-item>
        <text:list-item>
          <text:p text:style-name="P11">How to assign a Public IP and DNS endpoint.</text:p>
        </text:list-item>
        <text:list-item>
          <text:p text:style-name="P11">How to connect using RDP (Windows) and SSH (Linux).</text:p>
        </text:list-item>
        <text:list-item>
          <text:p text:style-name="P11">Security best practices such as restricting NSG rules to my IP and using SSH keys.</text:p>
        </text:list-item>
      </text:list>
      <text:p text:style-name="Horizontal_20_Line"/>
      <text:h text:style-name="Heading_20_2" text:outline-level="2"><text:soft-page-break/>Troubleshooting</text:h>
      <text:list text:style-name="L9">
        <text:list-item>
          <text:p text:style-name="P12"><text:span text:style-name="T1">Expired Subscription</text:span>: Prevented live connection. Documented steps instead.</text:p>
        </text:list-item>
        <text:list-item>
          <text:p text:style-name="P12"><text:span text:style-name="T1">Firewall Issues</text:span>: NSG rules must allow Ports 22/3389.</text:p>
        </text:list-item>
        <text:list-item>
          <text:p text:style-name="P12"><text:span text:style-name="T1">Credential Problems</text:span>: Reset VM password in Azure Portal if login fails.</text:p>
        </text:list-item>
        <text:list-item>
          <text:p text:style-name="P12"><text:span text:style-name="T1">SSH Key Mismatch</text:span>: Ensure correct public key is uploaded to VM.</text:p>
        </text:list-item>
      </text:list>
      <text:p text:style-name="Horizontal_20_Line"/>
      <text:h text:style-name="Heading_20_2" text:outline-level="2">Conclusion</text:h>
      <text:p text:style-name="Text_20_body">Even though the subscription expired, this project demonstrates knowledge of secure remote connectivity to Azure VMs, proper NSG configuration, and best practices for managing sessions. Screenshots and documentation provide proof of understanding the required skills.</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5T20:07:58.671373201</meta:creation-date>
    <dc:date>2026-06-15T20:09:57.082413940</dc:date>
    <meta:editing-duration>PT2M14S</meta:editing-duration>
    <meta:editing-cycles>1</meta:editing-cycles>
    <meta:document-statistic meta:table-count="1" meta:image-count="0" meta:object-count="0" meta:page-count="3" meta:paragraph-count="62" meta:word-count="442" meta:character-count="2771" meta:non-whitespace-character-count="2422"/>
    <meta:generator>LibreOffice/26.2.2.2$Linux_X86_64 LibreOffice_project/620$Build-2</meta:generator>
  </office:meta>
</office:document-meta>
</file>